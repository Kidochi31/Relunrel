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等线" svg:font-family="等线" style:font-family-generic="system" style:font-pitch="variable"/>
  </office:font-face-decls>
  <office:automatic-styles>
    <style:style style:name="P1" style:family="paragraph" style:parent-style-name="Standard">
      <style:text-properties style:font-name="FreeMono" fo:font-size="10pt" officeooo:rsid="001cb4e3" officeooo:paragraph-rsid="001cb4e3" style:font-size-asian="10pt" style:font-size-complex="10pt"/>
    </style:style>
    <style:style style:name="P2" style:family="paragraph" style:parent-style-name="Standard" style:list-style-name="L1">
      <style:text-properties style:font-name="FreeMono" fo:font-size="10pt" officeooo:rsid="001de0f6" officeooo:paragraph-rsid="001de0f6" style:font-size-asian="10pt" style:font-size-complex="10pt"/>
    </style:style>
    <style:style style:name="P3" style:family="paragraph" style:parent-style-name="Standard" style:list-style-name="L1">
      <style:text-properties style:font-name="FreeMono" fo:font-size="10pt" officeooo:rsid="001faf45" officeooo:paragraph-rsid="001faf45" style:font-size-asian="10pt" style:font-size-complex="10pt"/>
    </style:style>
    <style:style style:name="P4" style:family="paragraph" style:parent-style-name="Standard" style:list-style-name="L1">
      <style:text-properties style:font-name="FreeMono" fo:font-size="10pt" officeooo:rsid="001fcb08" officeooo:paragraph-rsid="001fcb08" style:font-size-asian="10pt" style:font-size-complex="10pt"/>
    </style:style>
    <style:style style:name="P5" style:family="paragraph" style:parent-style-name="Standard" style:list-style-name="L1">
      <style:text-properties style:font-name="FreeMono" fo:font-size="10pt" officeooo:rsid="001faf45" officeooo:paragraph-rsid="001fcb08" style:font-size-asian="10pt" style:font-size-complex="10pt"/>
    </style:style>
    <style:style style:name="P6" style:family="paragraph" style:parent-style-name="Standard" style:list-style-name="L1">
      <style:text-properties style:font-name="FreeMono" fo:font-size="10pt" officeooo:rsid="002118d5" officeooo:paragraph-rsid="002118d5" style:font-size-asian="10pt" style:font-size-complex="10pt"/>
    </style:style>
    <style:style style:name="P7" style:family="paragraph" style:parent-style-name="Standard" style:list-style-name="L1">
      <style:text-properties style:font-name="FreeMono" fo:font-size="10pt" officeooo:rsid="0020610e" officeooo:paragraph-rsid="0020610e" style:font-size-asian="10pt" style:font-size-complex="10pt"/>
    </style:style>
    <style:style style:name="P8" style:family="paragraph" style:parent-style-name="Standard" style:list-style-name="L1">
      <style:text-properties style:font-name="FreeMono" fo:font-size="10pt" officeooo:rsid="0022e008" officeooo:paragraph-rsid="0022e008" style:font-size-asian="10pt" style:font-size-complex="10pt"/>
    </style:style>
    <style:style style:name="P9" style:family="paragraph" style:parent-style-name="Standard">
      <style:text-properties style:font-name="FreeMono" fo:font-size="10pt" officeooo:rsid="001faf45" officeooo:paragraph-rsid="001faf45" style:font-size-asian="10pt" style:font-size-complex="10pt"/>
    </style:style>
    <style:style style:name="P10" style:family="paragraph" style:parent-style-name="Standard" style:list-style-name="L2">
      <style:text-properties style:font-name="FreeMono" fo:font-size="10pt" officeooo:rsid="001faf45" officeooo:paragraph-rsid="001faf45" style:font-size-asian="10pt" style:font-size-complex="10pt"/>
    </style:style>
    <style:style style:name="P11" style:family="paragraph" style:parent-style-name="Standard" style:list-style-name="L2">
      <style:text-properties style:font-name="FreeMono" fo:font-size="10pt" officeooo:rsid="00231b51" officeooo:paragraph-rsid="00231b51" style:font-size-asian="10pt" style:font-size-complex="10pt"/>
    </style:style>
    <style:style style:name="P12" style:family="paragraph" style:parent-style-name="Standard" style:list-style-name="L2">
      <style:text-properties style:font-name="FreeMono" fo:font-size="10pt" officeooo:rsid="0022e008" officeooo:paragraph-rsid="0022e008" style:font-size-asian="10pt" style:font-size-complex="10pt"/>
    </style:style>
    <style:style style:name="P13" style:family="paragraph" style:parent-style-name="Standard" style:list-style-name="L2">
      <style:text-properties style:font-name="FreeMono" fo:font-size="10pt" officeooo:rsid="0020610e" officeooo:paragraph-rsid="0020610e" style:font-size-asian="10pt" style:font-size-complex="10pt"/>
    </style:style>
    <style:style style:name="P14" style:family="paragraph" style:parent-style-name="Standard" style:list-style-name="L2">
      <style:text-properties style:font-name="FreeMono" fo:font-size="10pt" officeooo:rsid="002118d5" officeooo:paragraph-rsid="002118d5" style:font-size-asian="10pt" style:font-size-complex="10pt"/>
    </style:style>
    <style:style style:name="P15" style:family="paragraph" style:parent-style-name="Standard" style:list-style-name="L2">
      <style:text-properties style:font-name="FreeMono" fo:font-size="10pt" officeooo:rsid="00231b51" officeooo:paragraph-rsid="00243520" style:font-size-asian="10pt" style:font-size-complex="10pt"/>
    </style:style>
    <style:style style:name="P16" style:family="paragraph" style:parent-style-name="Standard" style:list-style-name="L2">
      <style:text-properties style:font-name="FreeMono" fo:font-size="10pt" officeooo:rsid="001faf45" officeooo:paragraph-rsid="002118d5" style:font-size-asian="10pt" style:font-size-complex="10pt"/>
    </style:style>
    <style:style style:name="P17" style:family="paragraph" style:parent-style-name="Standard" style:list-style-name="L2">
      <style:text-properties style:font-name="FreeMono" fo:font-size="10pt" officeooo:rsid="001faf45" officeooo:paragraph-rsid="0024e632" style:font-size-asian="10pt" style:font-size-complex="10pt"/>
    </style:style>
    <style:style style:name="P18" style:family="paragraph" style:parent-style-name="Standard" style:list-style-name="L2">
      <style:text-properties style:font-name="FreeMono" fo:font-size="10pt" officeooo:rsid="00231b51" officeooo:paragraph-rsid="0024e632" style:font-size-asian="10pt" style:font-size-complex="10pt"/>
    </style:style>
    <style:style style:name="P19" style:family="paragraph" style:parent-style-name="Standard" style:list-style-name="L2">
      <style:text-properties style:font-name="FreeMono" fo:font-size="10pt" officeooo:rsid="0022e008" officeooo:paragraph-rsid="0024e632" style:font-size-asian="10pt" style:font-size-complex="10pt"/>
    </style:style>
    <style:style style:name="P20" style:family="paragraph" style:parent-style-name="Standard" style:list-style-name="L2">
      <style:text-properties style:font-name="FreeMono" fo:font-size="10pt" officeooo:rsid="001faf45" officeooo:paragraph-rsid="002ac7a3" style:font-size-asian="10pt" style:font-size-complex="10pt"/>
    </style:style>
    <style:style style:name="P21" style:family="paragraph" style:parent-style-name="Standard" style:list-style-name="L2">
      <style:text-properties style:font-name="FreeMono" fo:font-size="10pt" officeooo:rsid="00231b51" officeooo:paragraph-rsid="002ac7a3" style:font-size-asian="10pt" style:font-size-complex="10pt"/>
    </style:style>
    <style:style style:name="P22" style:family="paragraph" style:parent-style-name="Standard" style:list-style-name="L2">
      <style:text-properties style:font-name="FreeMono" fo:font-size="10pt" officeooo:rsid="0022e008" officeooo:paragraph-rsid="002ac7a3" style:font-size-asian="10pt" style:font-size-complex="10pt"/>
    </style:style>
    <style:style style:name="P23" style:family="paragraph" style:parent-style-name="Standard">
      <style:text-properties style:font-name="FreeMono" fo:font-size="10pt" officeooo:rsid="00231b51" officeooo:paragraph-rsid="00231b51" style:font-size-asian="10pt" style:font-size-complex="10pt"/>
    </style:style>
    <style:style style:name="P24" style:family="paragraph" style:parent-style-name="Standard">
      <style:text-properties style:font-name="FreeMono" fo:font-size="10pt" officeooo:rsid="001faf45" officeooo:paragraph-rsid="002118d5" style:font-size-asian="10pt" style:font-size-complex="10pt"/>
    </style:style>
    <style:style style:name="P25" style:family="paragraph" style:parent-style-name="Standard">
      <style:text-properties style:font-name="FreeMono" fo:font-size="10pt" officeooo:rsid="0022e008" officeooo:paragraph-rsid="0022e008" style:font-size-asian="10pt" style:font-size-complex="10pt"/>
    </style:style>
    <style:style style:name="P26" style:family="paragraph" style:parent-style-name="Standard" style:list-style-name="L2">
      <style:text-properties style:font-name="FreeMono" fo:font-size="10pt" officeooo:rsid="0022e008" officeooo:paragraph-rsid="00231b51" style:font-size-asian="10pt" style:font-size-complex="10pt"/>
    </style:style>
    <style:style style:name="P27" style:family="paragraph" style:parent-style-name="Standard">
      <style:text-properties style:font-name="FreeMono" fo:font-size="10pt" officeooo:rsid="0024e632" officeooo:paragraph-rsid="0024e632" style:font-size-asian="10pt" style:font-size-complex="10pt"/>
    </style:style>
    <style:style style:name="P28" style:family="paragraph" style:parent-style-name="Standard">
      <style:text-properties style:font-name="FreeMono" fo:font-size="10pt" officeooo:rsid="00261d56" officeooo:paragraph-rsid="00261d56" style:font-size-asian="10pt" style:font-size-complex="10pt"/>
    </style:style>
    <style:style style:name="P29" style:family="paragraph" style:parent-style-name="Standard" style:list-style-name="L2">
      <style:text-properties style:font-name="FreeMono" fo:font-size="10pt" officeooo:rsid="0024e632" officeooo:paragraph-rsid="0024e632" style:font-size-asian="10pt" style:font-size-complex="10pt"/>
    </style:style>
    <style:style style:name="P30" style:family="paragraph" style:parent-style-name="Standard" style:list-style-name="L2">
      <style:text-properties style:font-name="FreeMono" fo:font-size="10pt" officeooo:rsid="00261d56" officeooo:paragraph-rsid="00261d56" style:font-size-asian="10pt" style:font-size-complex="10pt"/>
    </style:style>
    <style:style style:name="P31" style:family="paragraph" style:parent-style-name="Standard" style:list-style-name="L2">
      <style:text-properties style:font-name="FreeMono" fo:font-size="10pt" officeooo:rsid="0024e632" officeooo:paragraph-rsid="00261d56" style:font-size-asian="10pt" style:font-size-complex="10pt"/>
    </style:style>
    <style:style style:name="P32" style:family="paragraph" style:parent-style-name="Standard" style:list-style-name="L2">
      <style:text-properties style:font-name="FreeMono" fo:font-size="10pt" officeooo:rsid="00261d56" officeooo:paragraph-rsid="0028698f" style:font-size-asian="10pt" style:font-size-complex="10pt"/>
    </style:style>
    <style:style style:name="P33" style:family="paragraph" style:parent-style-name="Standard">
      <style:text-properties style:font-name="FreeMono" fo:font-size="10pt" officeooo:rsid="00280378" officeooo:paragraph-rsid="00280378" style:font-size-asian="10pt" style:font-size-complex="10pt"/>
    </style:style>
    <style:style style:name="P34" style:family="paragraph" style:parent-style-name="Standard" style:list-style-name="L2">
      <style:text-properties style:font-name="FreeMono" fo:font-size="10pt" officeooo:rsid="00280378" officeooo:paragraph-rsid="00280378" style:font-size-asian="10pt" style:font-size-complex="10pt"/>
    </style:style>
    <style:style style:name="P35" style:family="paragraph" style:parent-style-name="Standard" style:list-style-name="L2">
      <style:text-properties style:font-name="FreeMono" fo:font-size="10pt" officeooo:rsid="00280378" officeooo:paragraph-rsid="0028698f" style:font-size-asian="10pt" style:font-size-complex="10pt"/>
    </style:style>
    <style:style style:name="P36" style:family="paragraph" style:parent-style-name="Standard" style:list-style-name="L2">
      <style:text-properties style:font-name="FreeMono" fo:font-size="10pt" officeooo:rsid="00280378" officeooo:paragraph-rsid="002a039f" style:font-size-asian="10pt" style:font-size-complex="10pt"/>
    </style:style>
    <style:style style:name="P37" style:family="paragraph" style:parent-style-name="Standard">
      <style:text-properties style:font-name="FreeMono" fo:font-size="10pt" officeooo:rsid="00280378" officeooo:paragraph-rsid="0028698f" style:font-size-asian="10pt" style:font-size-complex="10pt"/>
    </style:style>
    <style:style style:name="P38" style:family="paragraph" style:parent-style-name="Standard">
      <style:text-properties style:font-name="FreeMono" fo:font-size="10pt" officeooo:rsid="0028698f" officeooo:paragraph-rsid="0028698f" style:font-size-asian="10pt" style:font-size-complex="10pt"/>
    </style:style>
    <style:style style:name="P39" style:family="paragraph" style:parent-style-name="Standard" style:list-style-name="L2">
      <style:text-properties style:font-name="FreeMono" fo:font-size="10pt" officeooo:rsid="0028698f" officeooo:paragraph-rsid="0028698f" style:font-size-asian="10pt" style:font-size-complex="10pt"/>
    </style:style>
    <style:style style:name="P40" style:family="paragraph" style:parent-style-name="Standard" style:list-style-name="L2">
      <style:text-properties style:font-name="FreeMono" fo:font-size="10pt" officeooo:rsid="002a039f" officeooo:paragraph-rsid="002a039f" style:font-size-asian="10pt" style:font-size-complex="10pt"/>
    </style:style>
    <style:style style:name="P41" style:family="paragraph" style:parent-style-name="Standard">
      <style:text-properties style:font-name="FreeMono" fo:font-size="10pt" officeooo:rsid="002a039f" officeooo:paragraph-rsid="002a039f" style:font-size-asian="10pt" style:font-size-complex="10pt"/>
    </style:style>
    <style:style style:name="P42" style:family="paragraph" style:parent-style-name="Standard" style:list-style-name="L2">
      <style:text-properties style:font-name="FreeMono" fo:font-size="10pt" officeooo:rsid="002ac7a3" officeooo:paragraph-rsid="002ac7a3" style:font-size-asian="10pt" style:font-size-complex="10pt"/>
    </style:style>
    <style:style style:name="P43" style:family="paragraph" style:parent-style-name="Standard">
      <style:text-properties style:font-name="FreeMono" fo:font-size="10pt" officeooo:rsid="002ac7a3" officeooo:paragraph-rsid="002ac7a3" style:font-size-asian="10pt" style:font-size-complex="10pt"/>
    </style:style>
    <style:style style:name="P44" style:family="paragraph" style:parent-style-name="Standard">
      <style:text-properties style:font-name="FreeMono" fo:font-size="10pt" officeooo:rsid="002bc5cc" officeooo:paragraph-rsid="002bc5cc" style:font-size-asian="10pt" style:font-size-complex="10pt"/>
    </style:style>
    <style:style style:name="P45" style:family="paragraph" style:parent-style-name="Standard" style:list-style-name="L2">
      <style:text-properties style:font-name="FreeMono" fo:font-size="10pt" officeooo:rsid="002bc5cc" officeooo:paragraph-rsid="002bc5cc" style:font-size-asian="10pt" style:font-size-complex="10pt"/>
    </style:style>
    <style:style style:name="T1" style:family="text">
      <style:text-properties officeooo:rsid="0022e008"/>
    </style:style>
    <style:style style:name="T2" style:family="text">
      <style:text-properties officeooo:rsid="001faf45"/>
    </style:style>
    <style:style style:name="T3" style:family="text">
      <style:text-properties officeooo:rsid="00231b51"/>
    </style:style>
    <style:style style:name="T4" style:family="text">
      <style:text-properties officeooo:rsid="002118d5"/>
    </style:style>
    <style:style style:name="T5" style:family="text">
      <style:text-properties officeooo:rsid="0024e632"/>
    </style:style>
    <style:style style:name="T6" style:family="text">
      <style:text-properties officeooo:rsid="002ac7a3"/>
    </style:style>
    <style:style style:name="T7" style:family="text">
      <style:text-properties officeooo:rsid="00261d56"/>
    </style:style>
    <style:style style:name="T8" style:family="text">
      <style:text-properties officeooo:rsid="0028698f"/>
    </style:style>
    <style:style style:name="T9" style:family="text">
      <style:text-properties officeooo:rsid="00280378"/>
    </style:style>
    <style:style style:name="T10" style:family="text">
      <style:text-properties officeooo:rsid="002a039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unrel</text:p>
      <text:p text:style-name="P1"/>
      <text:p text:style-name="P1"/>
      <text:p text:style-name="P1">State machine:</text:p>
      <text:list text:style-name="L1">
        <text:list-item>
          <text:p text:style-name="P2">DISCONNECTED</text:p>
          <text:list>
            <text:list-item>
              <text:p text:style-name="P2">User requests active connection → <text:span text:style-name="T1">create random V_SESSION_ID → </text:span><text:span text:style-name="T2">send P_REQUEST_CONNECT → ACTIVE_CONNECT</text:span></text:p>
            </text:list-item>
            <text:list-item>
              <text:p text:style-name="P3">User requests passive connection → PASSIVE_CONNECT_LISTEN</text:p>
            </text:list-item>
          </text:list>
        </text:list-item>
        <text:list-item>
          <text:p text:style-name="P2">ACTIVE_CONNECT</text:p>
          <text:list>
            <text:list-item>
              <text:p text:style-name="P3">Timeout → send P_REQUEST_CONNECT → ACTIVE_CONNECT</text:p>
            </text:list-item>
            <text:list-item>
              <text:p text:style-name="P3">Too many timeouts → send P_RESET → DISCONNECTED</text:p>
            </text:list-item>
            <text:list-item>
              <text:p text:style-name="P3">Receive P_RESPOND_CONNECT → <text:span text:style-name="T3">store received V_CONNECTION_TOKEN → </text:span>send P_COMPLETE_CONNECT → CONNECTED</text:p>
            </text:list-item>
            <text:list-item>
              <text:p text:style-name="P4">Receive P_RESET → DISCONNECTED</text:p>
            </text:list-item>
          </text:list>
        </text:list-item>
        <text:list-item>
          <text:p text:style-name="P2">PASSIVE_CONNECT_<text:span text:style-name="T2">LISTEN</text:span></text:p>
          <text:list>
            <text:list-item>
              <text:p text:style-name="P3">Receive P_REQUEST_CONNECT → <text:span text:style-name="T1">create new connection → store received V_SESSION_ID → </text:span><text:span text:style-name="T3">create random V_CONNECTION_TOKEN → </text:span>send P_RESPOND_CONNECT → PASSIVE_CONNECT_ATTEMPT_COMPLETE</text:p>
            </text:list-item>
          </text:list>
        </text:list-item>
        <text:list-item>
          <text:p text:style-name="P3">PASSIVE_CONNECT_ATTEMPT_COMPLETE</text:p>
          <text:list>
            <text:list-item>
              <text:p text:style-name="P3">Timeout → send P_RESPOND_CONNECT → PASSIVE_CONNECT_ATTEMPT_COMPLETE</text:p>
            </text:list-item>
            <text:list-item>
              <text:p text:style-name="P3">Too many timeouts → send P_RESET → DISCONNECTED</text:p>
            </text:list-item>
            <text:list-item>
              <text:p text:style-name="P3">Receive P_COMPLETE_CONNECT → CONNECTED</text:p>
            </text:list-item>
            <text:list-item>
              <text:p text:style-name="P4">Receive P_RESET → DISCONNECTED</text:p>
            </text:list-item>
          </text:list>
        </text:list-item>
        <text:list-item>
          <text:p text:style-name="P5">CONNECTED</text:p>
          <text:list>
            <text:list-item>
              <text:p text:style-name="P5">Receive P_RESPOND_CONNECT → send P_COMPLETE_CONNECT → CONNECTED</text:p>
            </text:list-item>
            <text:list-item>
              <text:p text:style-name="P4">Receive P_RESET → DISCONNECTED</text:p>
            </text:list-item>
            <text:list-item>
              <text:p text:style-name="P6">Receive P_REQUEST_FIN → send P_RESPOND_FIN → FIN_WAIT_PASSIVE</text:p>
            </text:list-item>
            <text:list-item>
              <text:p text:style-name="P7">User requests disconnect → send P_<text:span text:style-name="T4">REQUEST_FIN</text:span> → <text:span text:style-name="T4">FIN_WAIT_ACTIVE</text:span></text:p>
            </text:list-item>
            <text:list-item>
              <text:p text:style-name="P8">No packets received in time out → send P_RESET → DISCONNECTED</text:p>
            </text:list-item>
          </text:list>
        </text:list-item>
        <text:list-item>
          <text:p text:style-name="P6">FIN_WAIT_ACTIVE</text:p>
          <text:list>
            <text:list-item>
              <text:p text:style-name="P6">Timeout → send P_REQUEST_FIN → FIN_WAIT_ACTIVE</text:p>
            </text:list-item>
            <text:list-item>
              <text:p text:style-name="P6">Too many timeouts → send P_RESET → DISCONNECTED</text:p>
            </text:list-item>
            <text:list-item>
              <text:p text:style-name="P6">Receive P_RESPOND_FIN → send P_COMPLETE_FIN → TIME_WAIT</text:p>
            </text:list-item>
          </text:list>
        </text:list-item>
        <text:list-item>
          <text:p text:style-name="P6">FIN_WAIT_PASSIVE</text:p>
          <text:list>
            <text:list-item>
              <text:p text:style-name="P6">Timeout → send P_RESPOND_FIN → FIN_WAIT_PASSIVE</text:p>
            </text:list-item>
            <text:list-item>
              <text:p text:style-name="P6">Too many timeouts → send P_RESET → DISCONNECTED</text:p>
            </text:list-item>
            <text:list-item>
              <text:p text:style-name="P6">Receive P_COMPLETE_FIN → DISCONNECTED</text:p>
            </text:list-item>
          </text:list>
        </text:list-item>
        <text:list-item>
          <text:p text:style-name="P6">TIME_WAIT</text:p>
          <text:list>
            <text:list-item>
              <text:p text:style-name="P6">Receive P_RESPOND_FIN → send P_COMPLETE_FIN → TIME_WAIT</text:p>
            </text:list-item>
            <text:list-item>
              <text:p text:style-name="P6">Timeout → DISCONNECTED</text:p>
            </text:list-item>
          </text:list>
        </text:list-item>
      </text:list>
      <text:p text:style-name="P9"/>
      <text:p text:style-name="P9">Packets:</text:p>
      <text:list text:style-name="L2">
        <text:list-item>
          <text:p text:style-name="P10">P_REQUEST_CONNECT</text:p>
          <text:list>
            <text:list-item>
              <text:p text:style-name="P11">Header</text:p>
            </text:list-item>
            <text:list-item>
              <text:p text:style-name="P12">Ignore if V_PROTOCOL_VERSION =/= V_PROTOCOL_VERSION</text:p>
            </text:list-item>
            <text:list-item>
              <text:p text:style-name="P11">Ignore the V_CONNECTION_TOKEN field</text:p>
            </text:list-item>
          </text:list>
        </text:list-item>
        <text:list-item>
          <text:p text:style-name="P10">P_RESPOND_CONNECT</text:p>
          <text:list>
            <text:list-item>
              <text:p text:style-name="P11">Header</text:p>
            </text:list-item>
            <text:list-item>
              <text:p text:style-name="P12">Ignore if V_SESSION_ID =/= V_SESSION_ID</text:p>
            </text:list-item>
            <text:list-item>
              <text:p text:style-name="P12">Ignore if V_PROTOCOL_VERSION =/= V_PROTOCOL_VERSION</text:p>
            </text:list-item>
          </text:list>
        </text:list-item>
        <text:list-item>
          <text:p text:style-name="P10">P_COMPLETE_CONNECT</text:p>
          <text:list>
            <text:list-item>
              <text:p text:style-name="P11">Header</text:p>
            </text:list-item>
            <text:list-item>
              <text:p text:style-name="P12">Ignore if V_SESSION_ID =/= V_SESSION_ID</text:p>
            </text:list-item>
            <text:list-item>
              <text:p text:style-name="P12">Ignore if V_PROTOCOL_VERSION =/= V_PROTOCOL_VERSION</text:p>
            </text:list-item>
            <text:list-item>
              <text:p text:style-name="P11">Ignore if V_CONNECTION_TOKEN =/= V_CONNECTION_TOKEN</text:p>
            </text:list-item>
          </text:list>
        </text:list-item>
        <text:list-item>
          <text:p text:style-name="P10">P_RESET</text:p>
          <text:list>
            <text:list-item>
              <text:p text:style-name="P11">Header</text:p>
            </text:list-item>
            <text:list-item>
              <text:p text:style-name="P12">Ignore if V_SESSION_ID =/= V_SESSION_ID</text:p>
            </text:list-item>
            <text:list-item>
              <text:p text:style-name="P12">Ignore if V_PROTOCOL_VERSION =/= V_PROTOCOL_VERSION</text:p>
            </text:list-item>
            <text:list-item>
              <text:p text:style-name="P11">Ignore the V_CONNECTION_TOKEN field</text:p>
            </text:list-item>
          </text:list>
        </text:list-item>
        <text:list-item>
          <text:p text:style-name="P13">P_<text:span text:style-name="T4">REQUEST_FIN</text:span></text:p>
          <text:list>
            <text:list-item>
              <text:p text:style-name="P11">Header</text:p>
            </text:list-item>
            <text:list-item>
              <text:p text:style-name="P12">Ignore if V_SESSION_ID =/= V_SESSION_ID</text:p>
            </text:list-item>
            <text:list-item>
              <text:p text:style-name="P12">Ignore if V_PROTOCOL_VERSION =/= V_PROTOCOL_VERSION</text:p>
            </text:list-item>
            <text:list-item>
              <text:p text:style-name="P11">Ignore if V_CONNECTION_TOKEN =/= V_CONNECTION_TOKEN</text:p>
            </text:list-item>
          </text:list>
        </text:list-item>
        <text:list-item>
          <text:p text:style-name="P14">P_RESPOND_FIN</text:p>
          <text:list>
            <text:list-item>
              <text:p text:style-name="P15">Header</text:p>
            </text:list-item>
            <text:list-item>
              <text:p text:style-name="P12">Ignore if V_SESSION_ID =/= V_SESSION_ID</text:p>
            </text:list-item>
            <text:list-item>
              <text:p text:style-name="P12">Ignore if V_PROTOCOL_VERSION =/= V_PROTOCOL_VERSION</text:p>
            </text:list-item>
            <text:list-item>
              <text:p text:style-name="P11"><text:soft-page-break/>Ignore if V_CONNECTION_TOKEN =/= V_CONNECTION_TOKEN</text:p>
            </text:list-item>
          </text:list>
        </text:list-item>
        <text:list-item>
          <text:p text:style-name="P16">P_COMPLETE_<text:span text:style-name="T4">FIN</text:span></text:p>
          <text:list>
            <text:list-item>
              <text:p text:style-name="P15">Header</text:p>
            </text:list-item>
            <text:list-item>
              <text:p text:style-name="P12">Ignore if V_SESSION_ID =/= V_SESSION_ID</text:p>
            </text:list-item>
            <text:list-item>
              <text:p text:style-name="P12">Ignore if V_PROTOCOL_VERSION =/= V_PROTOCOL_VERSION</text:p>
            </text:list-item>
            <text:list-item>
              <text:p text:style-name="P11">Ignore if V_CONNECTION_TOKEN =/= V_CONNECTION_TOKEN</text:p>
            </text:list-item>
          </text:list>
        </text:list-item>
        <text:list-item>
          <text:p text:style-name="P17">P_<text:span text:style-name="T5">MESSAGE</text:span></text:p>
          <text:list>
            <text:list-item>
              <text:p text:style-name="P18">Header</text:p>
            </text:list-item>
            <text:list-item>
              <text:p text:style-name="P19">Ignore if V_SESSION_ID =/= V_SESSION_ID</text:p>
            </text:list-item>
            <text:list-item>
              <text:p text:style-name="P19">Ignore if V_PROTOCOL_VERSION =/= V_PROTOCOL_VERSION</text:p>
            </text:list-item>
            <text:list-item>
              <text:p text:style-name="P18">Ignore if V_CONNECTION_TOKEN =/= V_CONNECTION_TOKEN</text:p>
            </text:list-item>
          </text:list>
        </text:list-item>
        <text:list-item>
          <text:p text:style-name="P20">P_<text:span text:style-name="T6">HEARTBEAT</text:span></text:p>
          <text:list>
            <text:list-item>
              <text:p text:style-name="P21">Header</text:p>
            </text:list-item>
            <text:list-item>
              <text:p text:style-name="P22">Ignore if V_SESSION_ID =/= V_SESSION_ID</text:p>
            </text:list-item>
            <text:list-item>
              <text:p text:style-name="P22">Ignore if V_PROTOCOL_VERSION =/= V_PROTOCOL_VERSION</text:p>
            </text:list-item>
            <text:list-item>
              <text:p text:style-name="P21">Ignore if V_CONNECTION_TOKEN =/= V_CONNECTION_TOKEN</text:p>
            </text:list-item>
          </text:list>
        </text:list-item>
      </text:list>
      <text:p text:style-name="P23"/>
      <text:p text:style-name="P24"/>
      <text:p text:style-name="P25">Connection Data:</text:p>
      <text:list text:continue-numbering="true" text:style-name="L2">
        <text:list-item>
          <text:p text:style-name="P12">V_PROTOCOL_VERSION (U<text:span text:style-name="T3">I</text:span>nt8)</text:p>
        </text:list-item>
        <text:list-item>
          <text:p text:style-name="P12">V_SESSION_ID (U<text:span text:style-name="T3">I</text:span>nt32)</text:p>
        </text:list-item>
        <text:list-item>
          <text:p text:style-name="P11">V_CONNECTION_TOKEN (Uint32)</text:p>
        </text:list-item>
        <text:list-item>
          <text:p text:style-name="P11">V_PACKET_TYPE (UInt8)</text:p>
          <text:list>
            <text:list-item>
              <text:p text:style-name="P11">P_REQUEST_CONNECT</text:p>
            </text:list-item>
            <text:list-item>
              <text:p text:style-name="P11">P_RESPOND_CONNECT</text:p>
            </text:list-item>
            <text:list-item>
              <text:p text:style-name="P11">P_COMPLETE_CONNECT</text:p>
            </text:list-item>
            <text:list-item>
              <text:p text:style-name="P11">P_RESET</text:p>
            </text:list-item>
            <text:list-item>
              <text:p text:style-name="P11">P_REQUEST_FIN</text:p>
            </text:list-item>
            <text:list-item>
              <text:p text:style-name="P11">P_RESPOND_FIN</text:p>
            </text:list-item>
            <text:list-item>
              <text:p text:style-name="P11">P_COMPLETE_FIN</text:p>
            </text:list-item>
          </text:list>
        </text:list-item>
      </text:list>
      <text:p text:style-name="P23"/>
      <text:p text:style-name="P23">The header contains:</text:p>
      <text:list text:continue-numbering="true" text:style-name="L2">
        <text:list-item>
          <text:p text:style-name="P26">V_PROTOCOL_VERSION (U<text:span text:style-name="T3">I</text:span>nt8)</text:p>
        </text:list-item>
        <text:list-item>
          <text:p text:style-name="P26">V_SESSION_ID (U<text:span text:style-name="T3">I</text:span>nt32)</text:p>
        </text:list-item>
        <text:list-item>
          <text:p text:style-name="P11">V_CONNECTION_TOKEN (Uint32)</text:p>
        </text:list-item>
        <text:list-item>
          <text:p text:style-name="P11">V_PACKET_TYPE (Uint8)</text:p>
        </text:list-item>
      </text:list>
      <text:p text:style-name="P23"/>
      <text:p text:style-name="P27">Message packets (P_MESSAGE):</text:p>
      <text:p text:style-name="P27">Message packets can contain one or more records inside them.</text:p>
      <text:p text:style-name="P28">Each message itself can only contain a maximum of 1024 bytes. <text:span text:style-name="T6">Each packet can only contain up to 1200 bytes.</text:span></text:p>
      <text:p text:style-name="P28">Channels are independent of each other for each message type (e.g. channel 0 of R_UNRELIABLE_UNORDERED is different to channel 0 of R_UNRELIABLE_ORDERED)</text:p>
      <text:p text:style-name="P27">A record can be one of:</text:p>
      <text:list text:continue-numbering="true" text:style-name="L2">
        <text:list-item>
          <text:p text:style-name="P29">R_UNRELIABLE_UNORDERED</text:p>
          <text:list>
            <text:list-item>
              <text:p text:style-name="P30">RECORD_TYPE (UInt8)</text:p>
            </text:list-item>
            <text:list-item>
              <text:p text:style-name="P29">CHANNEL_ID (UInt16)</text:p>
            </text:list-item>
            <text:list-item>
              <text:p text:style-name="P29">PAYLOAD_LENGTH (UInt16)</text:p>
            </text:list-item>
            <text:list-item>
              <text:p text:style-name="P29">PAYLOAD</text:p>
            </text:list-item>
          </text:list>
        </text:list-item>
        <text:list-item>
          <text:p text:style-name="P29">R_UNRELIABLE_ORDERED</text:p>
          <text:list>
            <text:list-item>
              <text:p text:style-name="P30">RECORD_TYPE (UInt8)</text:p>
            </text:list-item>
            <text:list-item>
              <text:p text:style-name="P29">CHANNEL_ID (UInt16)</text:p>
            </text:list-item>
            <text:list-item>
              <text:p text:style-name="P29"><text:span text:style-name="T7">SEQUENCE</text:span>_ID (U<text:span text:style-name="T7">I</text:span>nt32)</text:p>
            </text:list-item>
            <text:list-item>
              <text:p text:style-name="P29">PAYLOAD_LENGTH (UInt16)</text:p>
            </text:list-item>
            <text:list-item>
              <text:p text:style-name="P29">PAYLOAD</text:p>
            </text:list-item>
          </text:list>
        </text:list-item>
        <text:list-item>
          <text:p text:style-name="P29">R_RELIABLE_UNORDERED</text:p>
          <text:list>
            <text:list-item>
              <text:p text:style-name="P30">RECORD_TYPE (UInt8)</text:p>
            </text:list-item>
            <text:list-item>
              <text:p text:style-name="P31">CHANNEL_ID (UInt16)</text:p>
            </text:list-item>
            <text:list-item>
              <text:p text:style-name="P31"><text:span text:style-name="T7">SEQUENCE</text:span>_ID (U<text:span text:style-name="T7">I</text:span>nt32)</text:p>
            </text:list-item>
            <text:list-item>
              <text:p text:style-name="P31">PAYLOAD_LENGTH (UInt16)</text:p>
            </text:list-item>
            <text:list-item>
              <text:p text:style-name="P31">PAYLOAD</text:p>
            </text:list-item>
          </text:list>
        </text:list-item>
        <text:list-item>
          <text:p text:style-name="P29">R_RELIABLE_ORDERED</text:p>
          <text:list>
            <text:list-item>
              <text:p text:style-name="P30">RECORD_TYPE (UInt8)</text:p>
            </text:list-item>
            <text:list-item>
              <text:p text:style-name="P31">CHANNEL_ID (UInt16)</text:p>
            </text:list-item>
            <text:list-item>
              <text:p text:style-name="P31"><text:span text:style-name="T7">SEQUENCE</text:span>_ID (U<text:span text:style-name="T7">I</text:span>nt32)</text:p>
            </text:list-item>
            <text:list-item>
              <text:p text:style-name="P31">PAYLOAD_LENGTH (UInt16)</text:p>
            </text:list-item>
            <text:list-item>
              <text:p text:style-name="P31">PAYLOAD</text:p>
            </text:list-item>
          </text:list>
        </text:list-item>
        <text:list-item>
          <text:p text:style-name="P29">R_ACK<text:span text:style-name="T8">_MASK</text:span></text:p>
          <text:list>
            <text:list-item>
              <text:p text:style-name="P30">RECORD_TYPE (Uint8) → <text:span text:style-name="T8">includes whether channel is ordered/unreliable</text:span></text:p>
            </text:list-item>
            <text:list-item>
              <text:p text:style-name="P30"><text:soft-page-break/>CHANNEL_ID (UInt16)</text:p>
            </text:list-item>
            <text:list-item>
              <text:p text:style-name="P30">RELATIVE_SEQUENCE_ID (UInt32)← is the last message ID in the bitfields, <text:span text:style-name="T9">it does not need to be the most recent message</text:span></text:p>
            </text:list-item>
            <text:list-item>
              <text:p text:style-name="P30">ACK_BITFIELD (Uint64)← the lsb is the RELATIVE_SEQUENCE_ID</text:p>
            </text:list-item>
          </text:list>
        </text:list-item>
        <text:list-item>
          <text:p text:style-name="P29">R_ACK_<text:span text:style-name="T8">CONTIGUOUS</text:span></text:p>
          <text:list>
            <text:list-item>
              <text:p text:style-name="P32">RECORD_TYPE (Uint8) → <text:span text:style-name="T8">includes whether channel is ordered/unreliable</text:span></text:p>
            </text:list-item>
            <text:list-item>
              <text:p text:style-name="P32">CHANNEL_ID (UInt16)</text:p>
            </text:list-item>
            <text:list-item>
              <text:p text:style-name="P32"><text:span text:style-name="T8">ACKNOWLEDGED</text:span>_SEQUENCE_ID (UInt32)← is the<text:span text:style-name="T8"> </text:span><text:span text:style-name="T10">highest</text:span><text:span text:style-name="T8"> contiguous sequence ID</text:span></text:p>
            </text:list-item>
          </text:list>
        </text:list-item>
      </text:list>
      <text:p text:style-name="P28"/>
      <text:p text:style-name="P33">Message type descriptions:</text:p>
      <text:list text:continue-numbering="true" text:style-name="L2">
        <text:list-item>
          <text:p text:style-name="P34">Unreliable, unordered:</text:p>
          <text:list>
            <text:list-item>
              <text:p text:style-name="P34">Essentially a UDP message, and is sent without any identification. It will not be retransmitted (send and forget). They may arrive out of order, and will be processed out of order.</text:p>
            </text:list-item>
          </text:list>
        </text:list-item>
        <text:list-item>
          <text:p text:style-name="P34">Unreliable, ordered:</text:p>
          <text:list>
            <text:list-item>
              <text:p text:style-name="P34">An ordered UDP message, and is sent with a SEQUENCE_ID. It will not be retransmitted (send and forget). If they arrive out of order, only messages more recent than the most recently received will be accepted. All older messages will be dropped.</text:p>
            </text:list-item>
          </text:list>
        </text:list-item>
        <text:list-item>
          <text:p text:style-name="P34">Reliable, unordered:</text:p>
          <text:list>
            <text:list-item>
              <text:p text:style-name="P35">An <text:span text:style-name="T8">un</text:span>ordered <text:span text:style-name="T8">reliable</text:span> message, and is sent with a SEQUENCE_ID. It <text:span text:style-name="T8">will be retransmitted if it is dropped/times out</text:span>. They may arrive out of order, and will be processed out of order. <text:span text:style-name="T8">If a message is retransmitted, it will only be processed once </text:span><text:span text:style-name="T10">(and subsequent retransmissions discarded).</text:span></text:p>
            </text:list-item>
          </text:list>
        </text:list-item>
        <text:list-item>
          <text:p text:style-name="P35">Reliable, <text:span text:style-name="T8">ordered</text:span>:</text:p>
          <text:list>
            <text:list-item>
              <text:p text:style-name="P36">An ordered <text:span text:style-name="T8">reliable</text:span> message, and is sent with a SEQUENCE_ID. It <text:span text:style-name="T8">will be retransmitted if it is dropped/times out</text:span>. If they arrive out of order, <text:span text:style-name="T8">the message will not be processed until all older messages have also arrived. </text:span><text:span text:style-name="T10">The messages will not be dropped, but instead bufferred until all contiguous earlier messages have been received.</text:span><text:span text:style-name="T8"> If a message is retransmitted, it will only be processed once </text:span><text:span text:style-name="T10">(and subsequent retransmissions discarded).</text:span></text:p>
            </text:list-item>
          </text:list>
        </text:list-item>
      </text:list>
      <text:p text:style-name="P37"/>
      <text:p text:style-name="P38">Sequence numbers:</text:p>
      <text:list text:continue-numbering="true" text:style-name="L2">
        <text:list-item>
          <text:p text:style-name="P39">Sequence numbers start at 0, and increase by one for each new message in a channel. The sequence number will loop once it reaches the maximum possible value. A sequence number A is newer than the sequence number B if (A – B) <text:span text:style-name="T6">modulo 2^N</text:span>, treated as an unsigned integer, is less than half the range of possible sequence numbers <text:span text:style-name="T10">2^(N-1)</text:span><text:span text:style-name="T6">,</text:span><text:span text:style-name="T10"> where N is the number of bits in the sequence number, </text:span><text:span text:style-name="T6">and greater than 0</text:span>.</text:p>
        </text:list-item>
      </text:list>
      <text:p text:style-name="P38"/>
      <text:p text:style-name="P38">Acknowledgements:</text:p>
      <text:list text:continue-numbering="true" text:style-name="L2">
        <text:list-item>
          <text:p text:style-name="P39">When a reliable message is received, the recipient will buffer an acknowledgement. When the recipient needs to send a packet to the sender, or a small timeout is reached, or the number of acknowledgements reaches a certain threshold, it will send all buffered acknolwedgements.</text:p>
        </text:list-item>
        <text:list-item>
          <text:p text:style-name="P39">The acknowledgement mask records allow for <text:span text:style-name="T10">the acknowledgement state of </text:span>64 contiguous messages to be <text:span text:style-name="T10">included </text:span>at once in one record. If more than 64 contiguous messages need to be acknowledged, then multiple acknowledgement records will be sent.</text:p>
        </text:list-item>
        <text:list-item>
          <text:p text:style-name="P39">The acknowledgement contiguous records allow for all sequence ids less than or equal to the given sequence id.</text:p>
        </text:list-item>
        <text:list-item>
          <text:p text:style-name="P40">Both the mask and contiguous acknowledgement records can be used for ordered and unordered communication. The contiguous record will be used in preference to the acknowledgement mask record. Otherwise, if it is required, the mask record will be used.</text:p>
        </text:list-item>
        <text:list-item>
          <text:p text:style-name="P40">This also means that the message window can be larger than 64 bits. <text:span text:style-name="T6">If a message is received outside of the receive window, it is dropped. The receiver may determine its own receive window</text:span></text:p>
        </text:list-item>
      </text:list>
      <text:p text:style-name="P41"/>
      <text:p text:style-name="P41">Retransmission:</text:p>
      <text:list text:continue-numbering="true" text:style-name="L2">
        <text:list-item>
          <text:p text:style-name="P40">Unreliable messages are never retransmitted.</text:p>
        </text:list-item>
        <text:list-item>
          <text:p text:style-name="P40">Reliable messages which are sent are assigned a timeout (determined by the RTT), at which point the reliable message must be retransmitted.</text:p>
        </text:list-item>
        <text:list-item>
          <text:p text:style-name="P40">If a reliable message is acknowledged before its timeout is reached, the reliable message is forgotten (as it has been received).</text:p>
        </text:list-item>
        <text:list-item>
          <text:p text:style-name="P42">The RTT is only determined by the first transmission of a reliable message.</text:p>
        </text:list-item>
      </text:list>
      <text:p text:style-name="P43"/>
      <text:p text:style-name="P43"><text:soft-page-break/>Connection timeout:</text:p>
      <text:list text:continue-numbering="true" text:style-name="L2">
        <text:list-item>
          <text:p text:style-name="P42">If no packet is sent within a 5 second period, a P_HEARTBEAT will be sent to the other side</text:p>
        </text:list-item>
        <text:list-item>
          <text:p text:style-name="P42">If no packet (including heartbeat packets) are received within a 20 second window, then the connection will timeout. A connection timeout will result in a P_RESET being sent, and immediately moving to the disconnected state.</text:p>
        </text:list-item>
      </text:list>
      <text:p text:style-name="P43"/>
      <text:p text:style-name="P44">Steps to implement:</text:p>
      <text:list text:continue-numbering="true" text:style-name="L2">
        <text:list-item>
          <text:p text:style-name="P45">Packet serialisation</text:p>
        </text:list-item>
        <text:list-item>
          <text:p text:style-name="P45">Connection state machine</text:p>
        </text:list-item>
        <text:list-item>
          <text:p text:style-name="P45">Reliable channels - retransmissions</text:p>
        </text:list-item>
        <text:list-item>
          <text:p text:style-name="P45">Ordered channels – buffering and sequencing</text:p>
        </text:list-item>
        <text:list-item>
          <text:p text:style-name="P45">Packet building</text:p>
        </text:list-item>
        <text:list-item>
          <text:p text:style-name="P45">Heartbeats and timeou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sian="等线" style:font-family-asian="等线"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onsola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6T18:56:26.084879509</meta:creation-date>
    <dc:date>2026-06-17T12:59:30.242632437</dc:date>
    <meta:editing-duration>PT2H3M39S</meta:editing-duration>
    <meta:editing-cycles>7</meta:editing-cycles>
    <meta:generator>LibreOffice/25.2.3.2$Linux_X86_64 LibreOffice_project/520$Build-2</meta:generator>
    <meta:document-statistic meta:table-count="0" meta:image-count="0" meta:object-count="0" meta:page-count="4" meta:paragraph-count="164" meta:word-count="1252" meta:character-count="8242" meta:non-whitespace-character-count="7300"/>
  </office:meta>
</office:document-meta>
</file>